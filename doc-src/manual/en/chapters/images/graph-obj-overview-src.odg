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0000001A4BFFD3BAC.png"/>
  <manifest:file-entry manifest:media-type="image/png" manifest:full-path="Pictures/1000000000000226000001908E2B1A4B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cc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800000"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8pt" style:font-size-complex="18pt"/>
    </style:style>
    <style:style style:name="P3" style:family="paragraph">
      <style:text-properties fo:font-size="12pt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454cm" svg:height="8.33cm" svg:x="3.516cm" svg:y="8.669cm">
          <draw:image xlink:href="Pictures/1000000000000226000001908E2B1A4B.png" xlink:type="simple" xlink:show="embed" xlink:actuate="onLoad">
            <text:p/>
          </draw:image>
        </draw:frame>
        <draw:frame draw:style-name="gr2" draw:text-style-name="P2" draw:layer="layout" svg:width="2.868cm" svg:height="0.725cm" svg:x="5.752cm" svg:y="7.26cm">
          <draw:text-box>
            <text:p text:style-name="P2">$graph-&gt;title</text:p>
          </draw:text-box>
        </draw:frame>
        <draw:frame draw:style-name="gr2" draw:text-style-name="P2" draw:layer="layout" svg:width="3.554cm" svg:height="0.725cm" svg:x="2.27cm" svg:y="8.62cm">
          <draw:text-box>
            <text:p text:style-name="P2">$graph-&gt;subtitle</text:p>
          </draw:text-box>
        </draw:frame>
        <draw:frame draw:style-name="gr2" draw:text-style-name="P2" draw:layer="layout" svg:width="3.482cm" svg:height="0.725cm" svg:x="14.028cm" svg:y="14.88cm">
          <draw:text-box>
            <text:p text:style-name="P2">$graph-&gt;legend</text:p>
          </draw:text-box>
        </draw:frame>
        <draw:frame draw:style-name="gr2" draw:text-style-name="P2" draw:layer="layout" svg:width="4.21cm" svg:height="0.725cm" svg:x="13.065cm" svg:y="16.24cm">
          <draw:text-box>
            <text:p text:style-name="P2">$graph-&gt;xaxis-&gt;title</text:p>
          </draw:text-box>
        </draw:frame>
        <draw:frame draw:style-name="gr2" draw:text-style-name="P2" draw:layer="layout" svg:width="4.21cm" svg:height="0.725cm" svg:x="1.235cm" svg:y="17.51cm">
          <draw:text-box>
            <text:p text:style-name="P2">$graph-&gt;yaxis-&gt;title</text:p>
          </draw:text-box>
        </draw:frame>
        <draw:frame draw:style-name="gr2" draw:text-style-name="P2" draw:layer="layout" svg:width="4.659cm" svg:height="0.725cm" svg:x="12.216cm" svg:y="6.715cm">
          <draw:text-box>
            <text:p text:style-name="P2">$graph-&gt;SetShadow()</text:p>
          </draw:text-box>
        </draw:frame>
        <draw:frame draw:style-name="gr2" draw:text-style-name="P2" draw:layer="layout" svg:width="3.402cm" svg:height="0.725cm" svg:x="12.838cm" svg:y="9.255cm">
          <draw:text-box>
            <text:p text:style-name="P2">$graph-&gt;y2axis</text:p>
          </draw:text-box>
        </draw:frame>
        <draw:frame draw:style-name="gr2" draw:text-style-name="P2" draw:layer="layout" svg:width="3.165cm" svg:height="0.725cm" svg:x="2.905cm" svg:y="16.24cm">
          <draw:text-box>
            <text:p text:style-name="P2">$graph-&gt;yaxis</text:p>
          </draw:text-box>
        </draw:frame>
        <draw:line draw:style-name="gr3" draw:text-style-name="P1" draw:layer="layout" svg:x1="8.62cm" svg:y1="7.985cm" svg:x2="9.309cm" svg:y2="8.852cm">
          <text:p/>
        </draw:line>
        <draw:line draw:style-name="gr3" draw:text-style-name="P1" draw:layer="layout" svg:x1="6.08cm" svg:y1="9.255cm" svg:x2="8.043cm" svg:y2="9.551cm">
          <text:p/>
        </draw:line>
        <draw:line draw:style-name="gr3" draw:text-style-name="P1" draw:layer="layout" svg:x1="13.17cm" svg:y1="10.027cm" svg:x2="12.012cm" svg:y2="11.694cm">
          <text:p/>
        </draw:line>
        <draw:line draw:style-name="gr3" draw:text-style-name="P1" draw:layer="layout" svg:x1="16.24cm" svg:y1="7.35cm" svg:x2="14.97cm" svg:y2="9.101cm">
          <text:p/>
        </draw:line>
        <draw:line draw:style-name="gr3" draw:text-style-name="P1" draw:layer="layout" svg:x1="13.065cm" svg:y1="16.875cm" svg:x2="11.721cm" svg:y2="16.007cm">
          <text:p/>
        </draw:line>
        <draw:line draw:style-name="gr3" draw:text-style-name="P1" draw:layer="layout" svg:x1="1.534cm" svg:y1="17.674cm" svg:x2="3.81cm" svg:y2="12.964cm">
          <text:p/>
        </draw:line>
        <draw:line draw:style-name="gr3" draw:text-style-name="P1" draw:layer="layout" svg:x1="15.605cm" svg:y1="14.97cm" svg:x2="13.784cm" svg:y2="13.388cm">
          <text:p/>
        </draw:line>
        <draw:line draw:style-name="gr3" draw:text-style-name="P1" draw:layer="layout" svg:x1="3.54cm" svg:y1="16.24cm" svg:x2="4.471cm" svg:y2="14.023cm">
          <text:p/>
        </draw:line>
        <draw:frame draw:style-name="gr2" draw:text-style-name="P2" draw:layer="layout" svg:width="3.165cm" svg:height="0.725cm" svg:x="8.62cm" svg:y="17.42cm">
          <draw:text-box>
            <text:p text:style-name="P2">$graph-&gt;xaxis</text:p>
          </draw:text-box>
        </draw:frame>
        <draw:line draw:style-name="gr3" draw:text-style-name="P1" draw:layer="layout" svg:x1="10.027cm" svg:y1="17.594cm" svg:x2="8.122cm" svg:y2="15.451cm">
          <text:p/>
        </draw:line>
        <draw:line draw:style-name="gr4" draw:text-style-name="P1" draw:layer="layout" svg:x1="7.35cm" svg:y1="15.505cm" svg:x2="7.35cm" svg:y2="16.775cm">
          <text:p/>
        </draw:line>
        <draw:line draw:style-name="gr5" draw:text-style-name="P1" draw:layer="layout" svg:x1="11.795cm" svg:y1="12.03cm" svg:x2="14.97cm" svg:y2="12.03cm">
          <text:p/>
        </draw:line>
        <draw:line draw:style-name="gr5" draw:text-style-name="P1" draw:layer="layout" svg:x1="7.35cm" svg:y1="15.505cm" svg:x2="7.35cm" svg:y2="16.775cm">
          <text:p/>
        </draw:line>
        <draw:line draw:style-name="gr5" draw:text-style-name="P1" draw:layer="layout" svg:x1="3.34cm" svg:y1="11.795cm" svg:x2="4.562cm" svg:y2="11.774cm">
          <text:p/>
        </draw:line>
        <draw:frame draw:style-name="gr2" draw:text-style-name="P2" draw:layer="layout" svg:width="5.692cm" svg:height="0.725cm" svg:x="4.837cm" svg:y="18.78cm">
          <draw:text-box>
            <text:p text:style-name="P2">$graph-&gt;SetMargin(_,_,_,x)</text:p>
          </draw:text-box>
        </draw:frame>
        <draw:line draw:style-name="gr5" draw:text-style-name="P1" draw:layer="layout" svg:x1="11.795cm" svg:y1="8.62cm" svg:x2="11.795cm" svg:y2="9.89cm">
          <text:p/>
        </draw:line>
        <draw:frame draw:style-name="gr2" draw:text-style-name="P2" draw:layer="layout" svg:width="5.692cm" svg:height="0.725cm" svg:x="13.723cm" svg:y="10.525cm">
          <draw:text-box>
            <text:p text:style-name="P2">$graph-&gt;SetMargin(_,x,_,_)</text:p>
          </draw:text-box>
        </draw:frame>
        <draw:frame draw:style-name="gr2" draw:text-style-name="P2" draw:layer="layout" svg:width="5.692cm" svg:height="0.725cm" svg:x="6.103cm" svg:y="6.08cm">
          <draw:text-box>
            <text:p text:style-name="P2">$graph-&gt;SetMargin(_,_,x,_)</text:p>
          </draw:text-box>
        </draw:frame>
        <draw:frame draw:style-name="gr2" draw:text-style-name="P2" draw:layer="layout" svg:width="5.692cm" svg:height="0.725cm" svg:x="1cm" svg:y="10.435cm">
          <draw:text-box>
            <text:p text:style-name="P2">$graph-&gt;SetMargin(x,_,_,_)</text:p>
          </draw:text-box>
        </draw:frame>
        <draw:line draw:style-name="gr6" draw:text-style-name="P1" draw:layer="layout" svg:x1="9.89cm" svg:y1="6.715cm" svg:x2="11.795cm" svg:y2="9.181cm">
          <text:p/>
        </draw:line>
        <draw:line draw:style-name="gr6" draw:text-style-name="P1" draw:layer="layout" svg:x1="16.875cm" svg:y1="11.16cm" svg:x2="13.467cm" svg:y2="12.03cm">
          <text:p/>
        </draw:line>
        <draw:line draw:style-name="gr6" draw:text-style-name="P1" draw:layer="layout" svg:x1="8.493cm" svg:y1="18.944cm" svg:x2="7.35cm" svg:y2="16.166cm">
          <text:p/>
        </draw:line>
        <draw:line draw:style-name="gr6" draw:text-style-name="P1" draw:layer="layout" svg:x1="2.905cm" svg:y1="11.16cm" svg:x2="3.942cm" svg:y2="11.641cm">
          <text:p/>
        </draw:line>
      </draw:page>
      <draw:page draw:name="page2" draw:style-name="dp1" draw:master-page-name="Default">
        <draw:frame draw:style-name="gr1" draw:text-style-name="P1" draw:layer="layout" svg:width="8.778cm" svg:height="9.218cm" svg:x="5.557cm" svg:y="6.403cm">
          <draw:image xlink:href="Pictures/1000000000000190000001A4BFFD3BAC.png" xlink:type="simple" xlink:show="embed" xlink:actuate="onLoad">
            <text:p/>
          </draw:image>
        </draw:frame>
        <draw:frame draw:style-name="gr2" draw:text-style-name="P2" draw:layer="layout" svg:width="6.111cm" svg:height="0.725cm" svg:x="13.109cm" svg:y="7.26cm">
          <draw:text-box>
            <text:p text:style-name="P2">$pieplot-&gt;SetCenter(0.5,0.47)</text:p>
          </draw:text-box>
        </draw:frame>
        <draw:frame draw:style-name="gr2" draw:text-style-name="P2" draw:layer="layout" svg:width="3.482cm" svg:height="0.725cm" svg:x="2.598cm" svg:y="12.975cm">
          <draw:text-box>
            <text:p text:style-name="P2">$graph-&gt;legend</text:p>
          </draw:text-box>
        </draw:frame>
        <draw:line draw:style-name="gr3" draw:text-style-name="P1" draw:layer="layout" svg:x1="4.81cm" svg:y1="13.7cm" svg:x2="6.482cm" svg:y2="14.87cm">
          <text:p/>
        </draw:line>
        <draw:frame draw:style-name="gr2" draw:text-style-name="P2" draw:layer="layout" svg:width="2.868cm" svg:height="0.725cm" svg:x="4.81cm" svg:y="4.72cm">
          <draw:text-box>
            <text:p text:style-name="P2">$graph-&gt;title</text:p>
          </draw:text-box>
        </draw:frame>
        <draw:line draw:style-name="gr3" draw:text-style-name="P1" draw:layer="layout" svg:x1="6.715cm" svg:y1="5.445cm" svg:x2="7.646cm" svg:y2="6.641cm">
          <text:p/>
        </draw:line>
        <draw:frame draw:style-name="gr2" draw:text-style-name="P2" draw:layer="layout" svg:width="3.554cm" svg:height="0.725cm" svg:x="3.161cm" svg:y="6.96cm">
          <draw:text-box>
            <text:p text:style-name="P2">$graph-&gt;subtitle</text:p>
          </draw:text-box>
        </draw:frame>
        <draw:line draw:style-name="gr3" draw:text-style-name="P1" draw:layer="layout" svg:x1="6.715cm" svg:y1="7.35cm" svg:x2="8.678cm" svg:y2="7.276cm">
          <text:p/>
        </draw:line>
        <draw:line draw:style-name="gr3" draw:text-style-name="P1" draw:layer="layout" svg:x1="14.97cm" svg:y1="7.985cm" svg:x2="10.028cm" svg:y2="10.742cm">
          <text:p/>
        </draw:line>
        <draw:frame draw:style-name="gr2" draw:text-style-name="P2" draw:layer="layout" svg:width="4.71cm" svg:height="0.725cm" svg:x="1.37cm" svg:y="8.62cm">
          <draw:text-box>
            <text:p text:style-name="P2">$pieplot-&gt;SetSize(0.3)</text:p>
          </draw:text-box>
        </draw:frame>
        <draw:line draw:style-name="gr3" draw:text-style-name="P1" draw:layer="layout" svg:x1="6.08cm" svg:y1="9.255cm" svg:x2="7.303cm" svg:y2="9.869cm">
          <text:p/>
        </draw:line>
        <draw:frame draw:style-name="gr2" draw:text-style-name="P2" draw:layer="layout" svg:width="3.389cm" svg:height="0.725cm" svg:x="13.7cm" svg:y="13.065cm">
          <draw:text-box>
            <text:p text:style-name="P2">$pieplot-&gt;value</text:p>
          </draw:text-box>
        </draw:frame>
        <draw:line draw:style-name="gr3" draw:text-style-name="P1" draw:layer="layout" svg:x1="16.24cm" svg:y1="13.065cm" svg:x2="13.282cm" svg:y2="12.197cm">
          <text:p/>
        </draw:line>
        <draw:custom-shape draw:style-name="gr7" draw:text-style-name="P1" draw:layer="layout" svg:width="5.715cm" svg:height="5.715cm" svg:x="7.15cm" svg:y="7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39cm" svg:height="0.725cm" svg:x="9.405cm" svg:y="4.81cm">
          <draw:text-box>
            <text:p text:style-name="P3"><text:span text:style-name="T1">PieGraph</text:span></text:p>
          </draw:text-box>
        </draw:frame>
        <draw:line draw:style-name="gr3" draw:text-style-name="P1" draw:layer="layout" svg:x1="10.525cm" svg:y1="5.445cm" svg:x2="11.562cm" svg:y2="6.40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8080" draw:marker-start-width="0.3cm" draw:marker-start-center="false" draw:marker-end-width="0.102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13T18:05:09</meta:creation-date>
    <dc:date>2009-06-13T20:31:26</dc:date>
    <meta:editing-duration>PT02H11M07S</meta:editing-duration>
    <meta:editing-cycles>3</meta:editing-cycles>
    <meta:generator>OpenOffice.org/3.1$Linux OpenOffice.org_project/310m21$Build-9319</meta:generator>
    <meta:document-statistic meta:object-count="48"/>
  </office:meta>
</office:document-meta>
</file>